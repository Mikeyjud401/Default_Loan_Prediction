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500000211B625A6E5A58EE46D.jpg" manifest:media-type="image/jpeg"/>
  <manifest:file-entry manifest:full-path="Pictures/10000000000001980000018102B3B729D983154B.png" manifest:media-type="image/png"/>
  <manifest:file-entry manifest:full-path="Pictures/100000000000038D000002AB787E9BF662C679C0.png" manifest:media-type="image/png"/>
  <manifest:file-entry manifest:full-path="Pictures/1000000000000186000000C91E20558D53482124.png" manifest:media-type="image/png"/>
  <manifest:file-entry manifest:full-path="Pictures/10000000000001A7000000ED9E8ED1E80344F6D4.png" manifest:media-type="image/png"/>
  <manifest:file-entry manifest:full-path="Pictures/1000000000000185000000CDD2ADA942ACBB3C0F.png" manifest:media-type="image/png"/>
  <manifest:file-entry manifest:full-path="Pictures/100000000000034700000233AFC53EBB69011143.jpg" manifest:media-type="image/jpeg"/>
  <manifest:file-entry manifest:full-path="Pictures/1000000000000230000001C09E04B9E990D26F19.png" manifest:media-type="image/png"/>
  <manifest:file-entry manifest:full-path="Pictures/10000000000002280000001FA02B230C3E1787CC.png" manifest:media-type="image/png"/>
  <manifest:file-entry manifest:full-path="Pictures/1000000000000300000001B80C108291D1BB6014.jpg" manifest:media-type="image/jpeg"/>
  <manifest:file-entry manifest:full-path="Pictures/10000000000000E000000019093A550A9633CDF0.png" manifest:media-type="image/png"/>
  <manifest:file-entry manifest:full-path="Pictures/100000000000039A000003753F52C6671A102B4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orgia Pro Light1" svg:font-family="'Georgia Pro Light'"/>
    <style:font-face style:name="Arial1" svg:font-family="Arial" style:font-pitch="variable"/>
    <style:font-face style:name="Georgia Pro Light" svg:font-family="'Georgia Pro Light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62626"/>
    </style:style>
    <style:style style:name="gr2" style:family="graphic" style:parent-style-name="standard">
      <style:graphic-properties draw:stroke="solid" svg:stroke-width="0.029cm" svg:stroke-color="#ccc9c2" draw:stroke-linejoin="miter" svg:stroke-linecap="butt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695cm" fo:min-width="1.69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6cm" fo:min-width="0.39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563cm" fo:min-width="1.56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14cm" fo:min-width="0.71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3cm" fo:min-width="0.50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15cm" fo:min-width="0.71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08cm" fo:min-width="0.60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403cm" fo:min-width="1.40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4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50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562cm" fo:min-width="1.56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</style:style>
    <style:style style:name="P1" style:family="paragraph">
      <loext:graphic-properties draw:fill="solid" draw:fill-color="#262626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48.0999984741211pt" style:font-size-asian="48.0999984741211pt" style:font-size-complex="48.0999984741211pt"/>
    </style:style>
    <style:style style:name="P5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6" style:family="paragraph">
      <loext:graphic-properties draw:fill="none"/>
      <style:text-properties fo:font-size="44.4000015258789pt" style:font-size-asian="44.4000015258789pt" style:font-size-complex="44.4000015258789pt"/>
    </style:style>
    <style:style style:name="P7" style:family="paragraph">
      <loext:graphic-properties draw:fill="none"/>
      <style:text-properties fo:font-size="20.2999992370605pt" style:font-size-asian="20.2999992370605pt" style:font-size-complex="20.2999992370605pt"/>
    </style:style>
    <style:style style:name="P8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  <style:text-properties fo:font-size="17.2999992370605pt" style:font-size-asian="17.2999992370605pt" style:font-size-complex="17.2999992370605pt"/>
    </style:style>
    <style:style style:name="P11" style:family="paragraph">
      <loext:graphic-properties draw:fill="none"/>
      <style:text-properties fo:font-size="39.7999992370605pt" style:font-size-asian="39.7999992370605pt" style:font-size-complex="39.7999992370605pt"/>
    </style:style>
    <style:style style:name="P12" style:family="paragraph">
      <loext:graphic-properties draw:fill="none"/>
      <style:text-properties fo:font-size="12.8000001907349pt" style:font-size-asian="12.8000001907349pt" style:font-size-complex="12.8000001907349pt"/>
    </style:style>
    <style:style style:name="P13" style:family="paragraph">
      <loext:graphic-properties draw:fill="none"/>
      <style:text-properties fo:font-size="44.2999992370605pt" style:font-size-asian="44.2999992370605pt" style:font-size-complex="44.2999992370605pt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ccc9c2" style:font-name="Georgia Pro Light1" fo:font-size="48.0999984741211pt" style:font-size-asian="48.0999984741211pt" style:font-name-complex="Georgia Pro Light1" style:font-size-complex="48.0999984741211pt"/>
    </style:style>
    <style:style style:name="T2" style:family="text">
      <style:text-properties fo:color="#ccc9c2" style:font-name="Georgia Pro Light1" fo:font-size="11.3000001907349pt" style:font-size-asian="11.3000001907349pt" style:font-name-complex="Georgia Pro Light1" style:font-size-complex="11.3000001907349pt"/>
    </style:style>
    <style:style style:name="T3" style:family="text">
      <style:text-properties fo:color="#ccc9c2" style:font-name="Georgia Pro Light1" fo:font-size="44.4000015258789pt" style:font-size-asian="44.4000015258789pt" style:font-name-complex="Georgia Pro Light1" style:font-size-complex="44.4000015258789pt"/>
    </style:style>
    <style:style style:name="T4" style:family="text">
      <style:text-properties fo:color="#ccc9c2" style:font-name="Georgia Pro Light1" fo:font-size="20.2999992370605pt" style:font-size-asian="20.2999992370605pt" style:font-name-complex="Georgia Pro Light1" style:font-size-complex="20.2999992370605pt"/>
    </style:style>
    <style:style style:name="T5" style:family="text">
      <style:text-properties fo:color="#ccc9c2" style:font-name="Arial2" fo:font-size="14.3000001907349pt" style:font-size-asian="14.3000001907349pt" style:font-name-complex="Arial2" style:font-size-complex="14.3000001907349pt"/>
    </style:style>
    <style:style style:name="T6" style:family="text">
      <style:text-properties fo:color="#ccc9c2" style:font-name="Arial2" fo:font-size="20.2999992370605pt" style:font-size-asian="20.2999992370605pt" style:font-name-complex="Arial2" style:font-size-complex="20.2999992370605pt"/>
    </style:style>
    <style:style style:name="T7" style:family="text">
      <style:text-properties fo:color="#ffffff" style:font-name="Georgia Pro Light1" fo:font-size="20.2999992370605pt" style:font-size-asian="20.2999992370605pt" style:font-name-complex="Georgia Pro Light1" style:font-size-complex="20.2999992370605pt"/>
    </style:style>
    <style:style style:name="T8" style:family="text">
      <style:text-properties fo:color="#ccc9c2" style:font-name="Georgia Pro Light1" fo:font-size="18pt" style:font-size-asian="18pt" style:font-name-complex="Georgia Pro Light1" style:font-size-complex="18pt"/>
    </style:style>
    <style:style style:name="T9" style:family="text">
      <style:text-properties fo:color="#ccc9c2" style:text-outline="true" style:font-name="Georgia Pro Light1" fo:font-size="20.2999992370605pt" style:font-size-asian="20.2999992370605pt" style:font-name-complex="Georgia Pro Light1" style:font-size-complex="20.2999992370605pt"/>
    </style:style>
    <style:style style:name="T10" style:family="text">
      <style:text-properties fo:color="#ccc9c2" style:font-name="Arial2" fo:font-size="18pt" style:font-size-asian="18pt" style:font-name-complex="Arial2" style:font-size-complex="18pt"/>
    </style:style>
    <style:style style:name="T11" style:family="text">
      <style:text-properties fo:color="#ccc9c2" style:font-name="Arial2" fo:font-size="17.2999992370605pt" style:font-size-asian="17.2999992370605pt" style:font-name-complex="Arial2" style:font-size-complex="17.2999992370605pt"/>
    </style:style>
    <style:style style:name="T12" style:family="text">
      <style:text-properties fo:color="#ccc9c2" style:font-name="Georgia Pro Light1" fo:font-size="17.2999992370605pt" style:font-size-asian="17.2999992370605pt" style:font-name-complex="Georgia Pro Light1" style:font-size-complex="17.2999992370605pt"/>
    </style:style>
    <style:style style:name="T13" style:family="text">
      <style:text-properties fo:color="#ccc9c2" style:font-name="Georgia Pro Light1" fo:font-size="39.7999992370605pt" style:font-size-asian="39.7999992370605pt" style:font-name-complex="Georgia Pro Light1" style:font-size-complex="39.7999992370605pt"/>
    </style:style>
    <style:style style:name="T14" style:family="text">
      <style:text-properties fo:color="#ccc9c2" style:text-outline="true" style:font-name="Georgia Pro Light1" fo:font-size="18pt" style:font-size-asian="18pt" style:font-name-complex="Georgia Pro Light1" style:font-size-complex="18pt"/>
    </style:style>
    <style:style style:name="T15" style:family="text">
      <style:text-properties fo:color="#ffffff" style:font-name="Georgia Pro Light1" fo:font-size="18pt" style:font-size-asian="18pt" style:font-name-complex="Georgia Pro Light1" style:font-size-complex="18pt"/>
    </style:style>
    <style:style style:name="T16" style:family="text">
      <style:text-properties fo:color="#ccc9c2" style:font-name="Arial2" fo:font-size="12.8000001907349pt" style:font-size-asian="12.8000001907349pt" style:font-name-complex="Arial2" style:font-size-complex="12.8000001907349pt"/>
    </style:style>
    <style:style style:name="T17" style:family="text">
      <style:text-properties fo:color="#ccc9c2" style:font-name="Georgia Pro Light1" fo:font-size="44.2999992370605pt" style:font-size-asian="44.2999992370605pt" style:font-name-complex="Georgia Pro Light1" style:font-size-complex="44.2999992370605pt"/>
    </style:style>
    <style:style style:name="T18" style:family="text">
      <style:text-properties fo:color="#e3e3e3" style:text-outline="true" style:font-name="Georgia Pro Light1" fo:font-size="17.2999992370605pt" style:font-size-asian="17.2999992370605pt" style:font-name-complex="Georgia Pro Light1" style:font-size-complex="17.2999992370605pt"/>
    </style:style>
    <style:style style:name="T19" style:family="text">
      <style:text-properties fo:color="#e3e3e3" style:font-name="Arial2" fo:font-size="12pt" style:font-size-asian="12pt" style:font-name-complex="Arial2" style:font-size-complex="12pt"/>
    </style:style>
    <style:style style:name="T20" style:family="text">
      <style:text-properties fo:color="#e3e3e3" style:font-name="Georgia Pro Light1" fo:font-size="17.2999992370605pt" style:font-size-asian="17.2999992370605pt" style:font-name-complex="Georgia Pro Light1" style:font-size-complex="17.2999992370605pt"/>
    </style:style>
    <style:style style:name="T21" style:family="text">
      <style:text-properties fo:color="#ccc9c2" style:text-outline="true" style:font-name="Georgia Pro Light1" fo:font-size="17.2999992370605pt" style:font-size-asian="17.2999992370605pt" style:font-name-complex="Georgia Pro Light1" style:font-size-complex="17.2999992370605pt"/>
    </style:style>
    <style:style style:name="T22" style:family="text">
      <style:text-properties fo:color="#ccc9c2" style:font-name="Arial2" fo:font-size="12pt" style:font-size-asian="12pt" style:font-name-complex="Arial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line draw:style-name="gr2" draw:text-style-name="P2" draw:layer="layout" svg:x1="2.659cm" svg:y1="17.369cm" svg:x2="31.34cm" svg:y2="17.369cm">
          <text:p/>
        </draw:line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3" draw:text-style-name="P4" draw:layer="layout" svg:width="17.858cm" svg:height="1.699cm" svg:x="8.418cm" svg:y="7.772cm">
          <draw:text-box>
            <text:p text:style-name="P3"><text:span text:style-name="T1">Loan Default Prediction</text:span></text:p>
          </draw:text-box>
        </draw:frame>
        <draw:frame draw:style-name="gr4" draw:text-style-name="P5" draw:layer="layout" svg:width="5.535cm" svg:height="0.399cm" svg:x="14.029cm" svg:y="10.287cm">
          <draw:text-box>
            <text:p text:style-name="P3"><text:span text:style-name="T2">B Y <text:s text:c="2"/>M I C H A E L <text:s text:c="2"/>J U D S O N</text:span></text:p>
          </draw:text-box>
        </draw:frame>
        <draw:line draw:style-name="gr2" draw:text-style-name="P2" draw:layer="layout" svg:x1="16.946cm" svg:y1="0.145cm" svg:x2="16.946cm" svg:y2="6.197cm">
          <text:p/>
        </draw:line>
        <draw:line draw:style-name="gr2" draw:text-style-name="P2" draw:layer="layout" svg:x1="16.946cm" svg:y1="13.11cm" svg:x2="16.946cm" svg:y2="19.064cm">
          <text:p/>
        </draw:line>
        <draw:frame draw:style-name="gr4" draw:text-style-name="P5" draw:layer="layout" svg:width="2.893cm" svg:height="0.399cm" svg:x="15.388cm" svg:y="11.108cm">
          <draw:text-box>
            <text:p text:style-name="P3"><text:span text:style-name="T2">0 4 / 1 2 / 2 0 2 5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line draw:style-name="gr2" draw:text-style-name="P2" draw:layer="layout" svg:x1="2.659cm" svg:y1="17.369cm" svg:x2="31.34cm" svg:y2="17.369cm">
          <text:p/>
        </draw:line>
        <draw:frame draw:style-name="gr5" draw:text-style-name="P6" draw:layer="layout" svg:width="12.88cm" svg:height="1.568cm" svg:x="2.589cm" svg:y="3.703cm">
          <draw:text-box>
            <text:p text:style-name="P3"><text:span text:style-name="T3">Problem definition</text:span></text:p>
          </draw:text-box>
        </draw:frame>
        <draw:frame draw:style-name="gr6" draw:text-style-name="P7" draw:layer="layout" svg:width="2.927cm" svg:height="0.716cm" svg:x="2.603cm" svg:y="6.887cm">
          <draw:text-box>
            <text:p text:style-name="P3"><text:span text:style-name="T4">CONTEXT</text:span></text:p>
          </draw:text-box>
        </draw:frame>
        <draw:frame draw:style-name="gr7" draw:text-style-name="P8" draw:layer="layout" svg:width="0.503cm" svg:height="0.564cm" svg:x="2.618cm" svg:y="8.231cm">
          <draw:text-box>
            <text:p text:style-name="P3"><text:span text:style-name="T5">•</text:span></text:p>
          </draw:text-box>
        </draw:frame>
        <draw:frame draw:style-name="gr8" draw:text-style-name="P7" draw:layer="layout" svg:width="7.825cm" svg:height="0.716cm" svg:x="3.253cm" svg:y="8.119cm">
          <draw:text-box>
            <text:p text:style-name="P3"><text:span text:style-name="T4">Banks offer home loans </text:span></text:p>
          </draw:text-box>
        </draw:frame>
        <draw:frame draw:style-name="gr6" draw:text-style-name="P7" draw:layer="layout" svg:width="5.069cm" svg:height="0.716cm" svg:x="3.253cm" svg:y="9.126cm">
          <draw:text-box>
            <text:p text:style-name="P3"><text:span text:style-name="T4">to obtain profits</text:span></text:p>
          </draw:text-box>
        </draw:frame>
        <draw:frame draw:style-name="gr7" draw:text-style-name="P8" draw:layer="layout" svg:width="0.503cm" svg:height="0.564cm" svg:x="2.618cm" svg:y="10.616cm">
          <draw:text-box>
            <text:p text:style-name="P3"><text:span text:style-name="T5">•</text:span></text:p>
          </draw:text-box>
        </draw:frame>
        <draw:frame draw:style-name="gr6" draw:text-style-name="P7" draw:layer="layout" svg:width="7.626cm" svg:height="0.716cm" svg:x="3.253cm" svg:y="10.504cm">
          <draw:text-box>
            <text:p text:style-name="P3"><text:span text:style-name="T4">Loans are borrowed by </text:span></text:p>
          </draw:text-box>
        </draw:frame>
        <draw:frame draw:style-name="gr6" draw:text-style-name="P7" draw:layer="layout" svg:width="5.162cm" svg:height="0.716cm" svg:x="3.253cm" svg:y="11.511cm">
          <draw:text-box>
            <text:p text:style-name="P3"><text:span text:style-name="T4">bank customers</text:span></text:p>
          </draw:text-box>
        </draw:frame>
        <draw:frame draw:style-name="gr7" draw:text-style-name="P8" draw:layer="layout" svg:width="0.503cm" svg:height="0.564cm" svg:x="2.618cm" svg:y="13.001cm">
          <draw:text-box>
            <text:p text:style-name="P3"><text:span text:style-name="T5">•</text:span></text:p>
          </draw:text-box>
        </draw:frame>
        <draw:frame draw:style-name="gr6" draw:text-style-name="P7" draw:layer="layout" svg:width="6.356cm" svg:height="0.716cm" svg:x="3.253cm" svg:y="12.889cm">
          <draw:text-box>
            <text:p text:style-name="P3"><text:span text:style-name="T4">Banks are rigorous </text:span></text:p>
          </draw:text-box>
        </draw:frame>
        <draw:frame draw:style-name="gr6" draw:text-style-name="P7" draw:layer="layout" svg:width="7.029cm" svg:height="0.716cm" svg:x="3.253cm" svg:y="13.896cm">
          <draw:text-box>
            <text:p text:style-name="P3"><text:span text:style-name="T4">while approving loans</text:span></text:p>
          </draw:text-box>
        </draw:frame>
        <draw:frame draw:style-name="gr6" draw:text-style-name="P7" draw:layer="layout" svg:width="3.232cm" svg:height="0.716cm" svg:x="12.472cm" svg:y="6.887cm">
          <draw:text-box>
            <text:p text:style-name="P3"><text:span text:style-name="T4">PROBLEM</text:span></text:p>
          </draw:text-box>
        </draw:frame>
        <draw:frame draw:style-name="gr7" draw:text-style-name="P8" draw:layer="layout" svg:width="0.503cm" svg:height="0.564cm" svg:x="12.189cm" svg:y="8.231cm">
          <draw:text-box>
            <text:p text:style-name="P3"><text:span text:style-name="T5">•</text:span></text:p>
          </draw:text-box>
        </draw:frame>
        <draw:frame draw:style-name="gr8" draw:text-style-name="P7" draw:layer="layout" svg:width="7.825cm" svg:height="0.716cm" svg:x="12.825cm" svg:y="8.119cm">
          <draw:text-box>
            <text:p text:style-name="P3"><text:span text:style-name="T4">Banks need an effective </text:span></text:p>
          </draw:text-box>
        </draw:frame>
        <draw:frame draw:style-name="gr6" draw:text-style-name="P7" draw:layer="layout" svg:width="5.565cm" svg:height="0.716cm" svg:x="12.825cm" svg:y="9.126cm">
          <draw:text-box>
            <text:p text:style-name="P3"><text:span text:style-name="T4">approval process</text:span></text:p>
          </draw:text-box>
        </draw:frame>
        <draw:frame draw:style-name="gr7" draw:text-style-name="P8" draw:layer="layout" svg:width="0.503cm" svg:height="0.564cm" svg:x="12.189cm" svg:y="10.616cm">
          <draw:text-box>
            <text:p text:style-name="P3"><text:span text:style-name="T5">•</text:span></text:p>
          </draw:text-box>
        </draw:frame>
        <draw:frame draw:style-name="gr6" draw:text-style-name="P7" draw:layer="layout" svg:width="7.097cm" svg:height="0.716cm" svg:x="12.825cm" svg:y="10.504cm">
          <draw:text-box>
            <text:p text:style-name="P3"><text:span text:style-name="T4">This process is effort-</text:span></text:p>
          </draw:text-box>
        </draw:frame>
        <draw:frame draw:style-name="gr6" draw:text-style-name="P7" draw:layer="layout" svg:width="8.299cm" svg:height="0.716cm" svg:x="12.825cm" svg:y="11.511cm">
          <draw:text-box>
            <text:p text:style-name="P3"><text:span text:style-name="T4">intensive and sensitive to </text:span></text:p>
          </draw:text-box>
        </draw:frame>
        <draw:frame draw:style-name="gr8" draw:text-style-name="P7" draw:layer="layout" svg:width="7.694cm" svg:height="0.716cm" svg:x="12.825cm" svg:y="12.543cm">
          <draw:text-box>
            <text:p text:style-name="P3"><text:span text:style-name="T4">human error and biases</text:span></text:p>
          </draw:text-box>
        </draw:frame>
        <draw:frame draw:style-name="gr8" draw:text-style-name="P7" draw:layer="layout" svg:width="0.715cm" svg:height="0.801cm" svg:x="22.213cm" svg:y="7.948cm">
          <draw:text-box>
            <text:p text:style-name="P3"><text:span text:style-name="T6">•</text:span></text:p>
          </draw:text-box>
        </draw:frame>
        <draw:frame draw:style-name="gr8" draw:text-style-name="P7" draw:layer="layout" svg:width="7.966cm" svg:height="0.716cm" svg:x="23.167cm" svg:y="8.028cm">
          <draw:text-box>
            <text:p text:style-name="P3"><text:span text:style-name="T4">Predicts</text:span><text:span text:style-name="T7"> </text:span><text:span text:style-name="T4">clients who are </text:span></text:p>
          </draw:text-box>
        </draw:frame>
        <draw:frame draw:style-name="gr6" draw:text-style-name="P7" draw:layer="layout" svg:width="7.783cm" svg:height="0.716cm" svg:x="23.167cm" svg:y="8.877cm">
          <draw:text-box>
            <text:p text:style-name="P3"><text:span text:style-name="T4">likely to default on their </text:span></text:p>
          </draw:text-box>
        </draw:frame>
        <draw:frame draw:style-name="gr6" draw:text-style-name="P7" draw:layer="layout" svg:width="1.378cm" svg:height="0.716cm" svg:x="23.167cm" svg:y="9.724cm">
          <draw:text-box>
            <text:p text:style-name="P3"><text:span text:style-name="T4">loan</text:span></text:p>
          </draw:text-box>
        </draw:frame>
        <draw:frame draw:style-name="gr6" draw:text-style-name="P7" draw:layer="layout" svg:width="0.714cm" svg:height="0.801cm" svg:x="22.213cm" svg:y="11.341cm">
          <draw:text-box>
            <text:p text:style-name="P3"><text:span text:style-name="T6">•</text:span></text:p>
          </draw:text-box>
        </draw:frame>
        <draw:frame draw:style-name="gr6" draw:text-style-name="P7" draw:layer="layout" svg:width="5.404cm" svg:height="0.716cm" svg:x="23.167cm" svg:y="11.421cm">
          <draw:text-box>
            <text:p text:style-name="P3"><text:span text:style-name="T4">Avoid the risk of </text:span></text:p>
          </draw:text-box>
        </draw:frame>
        <draw:frame draw:style-name="gr6" draw:text-style-name="P7" draw:layer="layout" svg:width="6.373cm" svg:height="0.716cm" svg:x="23.167cm" svg:y="12.268cm">
          <draw:text-box>
            <text:p text:style-name="P3"><text:span text:style-name="T4">misclassification of </text:span></text:p>
          </draw:text-box>
        </draw:frame>
        <draw:frame draw:style-name="gr8" draw:text-style-name="P7" draw:layer="layout" svg:width="8.486cm" svg:height="0.716cm" svg:x="23.167cm" svg:y="13.115cm">
          <draw:text-box>
            <text:p text:style-name="P3"><text:span text:style-name="T4">default loans predicted as </text:span></text:p>
          </draw:text-box>
        </draw:frame>
        <draw:frame draw:style-name="gr6" draw:text-style-name="P7" draw:layer="layout" svg:width="5.687cm" svg:height="0.716cm" svg:x="23.167cm" svg:y="13.964cm">
          <draw:text-box>
            <text:p text:style-name="P3"><text:span text:style-name="T4">non-default loans</text:span></text:p>
          </draw:text-box>
        </draw:frame>
        <draw:frame draw:style-name="gr6" draw:text-style-name="P7" draw:layer="layout" svg:width="3.986cm" svg:height="0.716cm" svg:x="22.532cm" svg:y="6.863cm">
          <draw:text-box>
            <text:p text:style-name="P3"><text:span text:style-name="T4">OBJECTIVES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line draw:style-name="gr2" draw:text-style-name="P2" draw:layer="layout" svg:x1="2.659cm" svg:y1="17.369cm" svg:x2="31.34cm" svg:y2="17.369cm">
          <text:p/>
        </draw:line>
        <draw:frame draw:style-name="gr9" draw:text-style-name="P2" draw:layer="layout" svg:width="24.235cm" svg:height="11.826cm" svg:x="4.366cm" svg:y="4.763cm">
          <draw:image xlink:href="Pictures/100000000000037500000211B625A6E5A58EE46D.jpg" xlink:type="simple" xlink:show="embed" xlink:actuate="onLoad" loext:mime-type="image/jpeg">
            <text:p/>
          </draw:image>
        </draw:frame>
        <draw:frame draw:style-name="gr5" draw:text-style-name="P6" draw:layer="layout" svg:width="13.354cm" svg:height="1.568cm" svg:x="2.263cm" svg:y="2.975cm">
          <draw:text-box>
            <text:p text:style-name="P3"><text:span text:style-name="T3">Solution Approach </text:span></text:p>
          </draw:text-box>
        </draw:frame>
        <draw:frame draw:style-name="gr10" draw:text-style-name="P9" draw:layer="layout" svg:width="9.87cm" svg:height="0.636cm" svg:x="1.906cm" svg:y="18.024cm">
          <draw:text-box>
            <text:p text:style-name="P3"><text:span text:style-name="T8">*Image taken from Databricks.com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line draw:style-name="gr2" draw:text-style-name="P2" draw:layer="layout" svg:x1="2.659cm" svg:y1="17.369cm" svg:x2="31.34cm" svg:y2="17.369cm">
          <text:p/>
        </draw:line>
        <draw:frame draw:style-name="gr5" draw:text-style-name="P6" draw:layer="layout" svg:width="12.893cm" svg:height="1.568cm" svg:x="2.589cm" svg:y="1.054cm">
          <draw:text-box>
            <text:p text:style-name="P3"><text:span text:style-name="T3">Data Set Overview</text:span></text:p>
          </draw:text-box>
        </draw:frame>
        <draw:frame draw:style-name="gr9" draw:text-style-name="P2" draw:layer="layout" svg:width="8.942cm" svg:height="7.566cm" svg:x="3.096cm" svg:y="4.736cm">
          <draw:image xlink:href="Pictures/10000000000001980000018102B3B729D983154B.png" xlink:type="simple" xlink:show="embed" xlink:actuate="onLoad" loext:mime-type="image/png">
            <text:p/>
          </draw:image>
        </draw:frame>
        <draw:frame draw:style-name="gr6" draw:text-style-name="P7" draw:layer="layout" svg:width="7.334cm" svg:height="0.716cm" svg:x="3.274cm" svg:y="3.885cm">
          <draw:text-box>
            <text:p text:style-name="P3"><text:span text:style-name="T9">LOAN DEFAULT RATES</text:span></text:p>
          </draw:text-box>
        </draw:frame>
        <draw:frame draw:style-name="gr9" draw:text-style-name="P2" draw:layer="layout" svg:width="13.281cm" svg:height="7.54cm" svg:x="16.907cm" svg:y="4.736cm">
          <draw:image xlink:href="Pictures/10000000000001A7000000ED9E8ED1E80344F6D4.png" xlink:type="simple" xlink:show="embed" xlink:actuate="onLoad" loext:mime-type="image/png">
            <text:p/>
          </draw:image>
        </draw:frame>
        <draw:frame draw:style-name="gr6" draw:text-style-name="P7" draw:layer="layout" svg:width="5.62cm" svg:height="0.716cm" svg:x="17.203cm" svg:y="3.885cm">
          <draw:text-box>
            <text:p text:style-name="P3"><text:span text:style-name="T9">MISSING VALUES</text:span></text:p>
          </draw:text-box>
        </draw:frame>
        <draw:frame draw:style-name="gr10" draw:text-style-name="P9" draw:layer="layout" svg:width="0.635cm" svg:height="0.712cm" svg:x="2.619cm" svg:y="12.463cm">
          <draw:text-box>
            <text:p text:style-name="P3"><text:span text:style-name="T10">•</text:span></text:p>
          </draw:text-box>
        </draw:frame>
        <draw:frame draw:style-name="gr10" draw:text-style-name="P9" draw:layer="layout" svg:width="10.45cm" svg:height="0.636cm" svg:x="3.414cm" svg:y="12.534cm">
          <draw:text-box>
            <text:p text:style-name="P3"><text:span text:style-name="T8">The dataset contains 5,960 registers </text:span></text:p>
          </draw:text-box>
        </draw:frame>
        <draw:frame draw:style-name="gr10" draw:text-style-name="P9" draw:layer="layout" svg:width="4.303cm" svg:height="0.636cm" svg:x="3.414cm" svg:y="13.303cm">
          <draw:text-box>
            <text:p text:style-name="P3"><text:span text:style-name="T8">and 13 features</text:span></text:p>
          </draw:text-box>
        </draw:frame>
        <draw:frame draw:style-name="gr10" draw:text-style-name="P9" draw:layer="layout" svg:width="0.635cm" svg:height="0.712cm" svg:x="2.619cm" svg:y="14cm">
          <draw:text-box>
            <text:p text:style-name="P3"><text:span text:style-name="T10">•</text:span></text:p>
          </draw:text-box>
        </draw:frame>
        <draw:frame draw:style-name="gr10" draw:text-style-name="P9" draw:layer="layout" svg:width="10.59cm" svg:height="0.636cm" svg:x="3.414cm" svg:y="14.071cm">
          <draw:text-box>
            <text:p text:style-name="P3"><text:span text:style-name="T8">The overall loan default rate is about </text:span></text:p>
          </draw:text-box>
        </draw:frame>
        <draw:frame draw:style-name="gr10" draw:text-style-name="P9" draw:layer="layout" svg:width="1.115cm" svg:height="0.636cm" svg:x="3.414cm" svg:y="14.839cm">
          <draw:text-box>
            <text:p text:style-name="P3"><text:span text:style-name="T8">20%</text:span></text:p>
          </draw:text-box>
        </draw:frame>
        <draw:frame draw:style-name="gr11" draw:text-style-name="P10" draw:layer="layout" svg:width="0.608cm" svg:height="0.683cm" svg:x="2.619cm" svg:y="15.508cm">
          <draw:text-box>
            <text:p text:style-name="P3"><text:span text:style-name="T11">•</text:span></text:p>
          </draw:text-box>
        </draw:frame>
        <draw:frame draw:style-name="gr11" draw:text-style-name="P10" draw:layer="layout" svg:width="10.45cm" svg:height="0.611cm" svg:x="3.414cm" svg:y="15.575cm">
          <draw:text-box>
            <text:p text:style-name="P3"><text:span text:style-name="T12">The data is unbalanced in an 80%/20% </text:span></text:p>
          </draw:text-box>
        </draw:frame>
        <draw:frame draw:style-name="gr11" draw:text-style-name="P10" draw:layer="layout" svg:width="2.86cm" svg:height="0.611cm" svg:x="3.414cm" svg:y="16.317cm">
          <draw:text-box>
            <text:p text:style-name="P3"><text:span text:style-name="T12">proportion</text:span></text:p>
          </draw:text-box>
        </draw:frame>
        <draw:frame draw:style-name="gr10" draw:text-style-name="P9" draw:layer="layout" svg:width="0.635cm" svg:height="0.712cm" svg:x="17.2cm" svg:y="12.64cm">
          <draw:text-box>
            <text:p text:style-name="P3"><text:span text:style-name="T10">•</text:span></text:p>
          </draw:text-box>
        </draw:frame>
        <draw:frame draw:style-name="gr10" draw:text-style-name="P9" draw:layer="layout" svg:width="12.473cm" svg:height="0.636cm" svg:x="17.995cm" svg:y="12.711cm">
          <draw:text-box>
            <text:p text:style-name="P3"><text:span text:style-name="T8">All features have missing values except for </text:span></text:p>
          </draw:text-box>
        </draw:frame>
        <draw:frame draw:style-name="gr10" draw:text-style-name="P9" draw:layer="layout" svg:width="4.244cm" svg:height="0.636cm" svg:x="17.995cm" svg:y="13.479cm">
          <draw:text-box>
            <text:p text:style-name="P3"><text:span text:style-name="T8">LOAN and BAD</text:span></text:p>
          </draw:text-box>
        </draw:frame>
        <draw:frame draw:style-name="gr10" draw:text-style-name="P9" draw:layer="layout" svg:width="0.635cm" svg:height="0.712cm" svg:x="17.2cm" svg:y="14.177cm">
          <draw:text-box>
            <text:p text:style-name="P3"><text:span text:style-name="T10">•</text:span></text:p>
          </draw:text-box>
        </draw:frame>
        <draw:frame draw:style-name="gr10" draw:text-style-name="P9" draw:layer="layout" svg:width="11.055cm" svg:height="0.636cm" svg:x="17.995cm" svg:y="14.248cm">
          <draw:text-box>
            <text:p text:style-name="P3"><text:span text:style-name="T8">Use Median and Mode to fill in missing </text:span></text:p>
          </draw:text-box>
        </draw:frame>
        <draw:frame draw:style-name="gr10" draw:text-style-name="P9" draw:layer="layout" svg:width="1.86cm" svg:height="0.636cm" svg:x="17.995cm" svg:y="15.016cm">
          <draw:text-box>
            <text:p text:style-name="P3"><text:span text:style-name="T8">values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line draw:style-name="gr2" draw:text-style-name="P2" draw:layer="layout" svg:x1="2.659cm" svg:y1="17.369cm" svg:x2="31.34cm" svg:y2="17.369cm">
          <text:p/>
        </draw:line>
        <draw:frame draw:style-name="gr5" draw:text-style-name="P6" draw:layer="layout" svg:width="12.893cm" svg:height="1.568cm" svg:x="2.62cm" svg:y="1.428cm">
          <draw:text-box>
            <text:p text:style-name="P3"><text:span text:style-name="T3">Data Set Overview</text:span></text:p>
          </draw:text-box>
        </draw:frame>
        <draw:frame draw:style-name="gr9" draw:text-style-name="P2" draw:layer="layout" svg:width="11.191cm" svg:height="6.19cm" svg:x="2.355cm" svg:y="5.927cm">
          <draw:image xlink:href="Pictures/1000000000000186000000C91E20558D53482124.png" xlink:type="simple" xlink:show="embed" xlink:actuate="onLoad" loext:mime-type="image/png">
            <text:p/>
          </draw:image>
        </draw:frame>
        <draw:frame draw:style-name="gr6" draw:text-style-name="P7" draw:layer="layout" svg:width="3.943cm" svg:height="0.716cm" svg:x="2.634cm" svg:y="5.018cm">
          <draw:text-box>
            <text:p text:style-name="P3"><text:span text:style-name="T9">DATA TYPES</text:span></text:p>
          </draw:text-box>
        </draw:frame>
        <draw:frame draw:style-name="gr9" draw:text-style-name="P2" draw:layer="layout" svg:width="11.773cm" svg:height="6.217cm" svg:x="17.621cm" svg:y="5.927cm">
          <draw:image xlink:href="Pictures/1000000000000185000000CDD2ADA942ACBB3C0F.png" xlink:type="simple" xlink:show="embed" xlink:actuate="onLoad" loext:mime-type="image/png">
            <text:p/>
          </draw:image>
        </draw:frame>
        <draw:frame draw:style-name="gr6" draw:text-style-name="P7" draw:layer="layout" svg:width="3.219cm" svg:height="0.716cm" svg:x="17.876cm" svg:y="5.018cm">
          <draw:text-box>
            <text:p text:style-name="P3"><text:span text:style-name="T9">OUTLIERS</text:span></text:p>
          </draw:text-box>
        </draw:frame>
        <draw:frame draw:style-name="gr10" draw:text-style-name="P9" draw:layer="layout" svg:width="0.635cm" svg:height="0.712cm" svg:x="2.619cm" svg:y="12.887cm">
          <draw:text-box>
            <text:p text:style-name="P3"><text:span text:style-name="T10">•</text:span></text:p>
          </draw:text-box>
        </draw:frame>
        <draw:frame draw:style-name="gr10" draw:text-style-name="P9" draw:layer="layout" svg:width="9.493cm" svg:height="0.636cm" svg:x="3.414cm" svg:y="12.958cm">
          <draw:text-box>
            <text:p text:style-name="P3"><text:span text:style-name="T8">Data types are distributed with 11 </text:span></text:p>
          </draw:text-box>
        </draw:frame>
        <draw:frame draw:style-name="gr10" draw:text-style-name="P9" draw:layer="layout" svg:width="8.062cm" svg:height="0.636cm" svg:x="3.414cm" svg:y="13.726cm">
          <draw:text-box>
            <text:p text:style-name="P3"><text:span text:style-name="T8">numerical and 2 categorical </text:span></text:p>
          </draw:text-box>
        </draw:frame>
        <draw:frame draw:style-name="gr10" draw:text-style-name="P9" draw:layer="layout" svg:width="2.381cm" svg:height="0.636cm" svg:x="3.414cm" svg:y="14.494cm">
          <draw:text-box>
            <text:p text:style-name="P3"><text:span text:style-name="T8">features</text:span></text:p>
          </draw:text-box>
        </draw:frame>
        <draw:frame draw:style-name="gr10" draw:text-style-name="P9" draw:layer="layout" svg:width="0.635cm" svg:height="0.712cm" svg:x="2.619cm" svg:y="15.193cm">
          <draw:text-box>
            <text:p text:style-name="P3"><text:span text:style-name="T10">•</text:span></text:p>
          </draw:text-box>
        </draw:frame>
        <draw:frame draw:style-name="gr10" draw:text-style-name="P9" draw:layer="layout" svg:width="9.286cm" svg:height="0.636cm" svg:x="3.414cm" svg:y="15.263cm">
          <draw:text-box>
            <text:p text:style-name="P3"><text:span text:style-name="T8">Categorical data will need to be <text:s/></text:span></text:p>
          </draw:text-box>
        </draw:frame>
        <draw:frame draw:style-name="gr10" draw:text-style-name="P9" draw:layer="layout" svg:width="6.589cm" svg:height="0.636cm" svg:x="3.414cm" svg:y="16.032cm">
          <draw:text-box>
            <text:p text:style-name="P3"><text:span text:style-name="T8">converted to numerical</text:span></text:p>
          </draw:text-box>
        </draw:frame>
        <draw:frame draw:style-name="gr10" draw:text-style-name="P9" draw:layer="layout" svg:width="0.635cm" svg:height="0.712cm" svg:x="17.872cm" svg:y="12.781cm">
          <draw:text-box>
            <text:p text:style-name="P3"><text:span text:style-name="T10">•</text:span></text:p>
          </draw:text-box>
        </draw:frame>
        <draw:frame draw:style-name="gr10" draw:text-style-name="P9" draw:layer="layout" svg:width="10.196cm" svg:height="0.636cm" svg:x="18.665cm" svg:y="12.852cm">
          <draw:text-box>
            <text:p text:style-name="P3"><text:span text:style-name="T8">All features have a large amount of </text:span></text:p>
          </draw:text-box>
        </draw:frame>
        <draw:frame draw:style-name="gr10" draw:text-style-name="P9" draw:layer="layout" svg:width="2.191cm" svg:height="0.636cm" svg:x="18.665cm" svg:y="13.62cm">
          <draw:text-box>
            <text:p text:style-name="P3"><text:span text:style-name="T8">outliers</text:span></text:p>
          </draw:text-box>
        </draw:frame>
        <draw:frame draw:style-name="gr10" draw:text-style-name="P9" draw:layer="layout" svg:width="0.635cm" svg:height="0.712cm" svg:x="17.872cm" svg:y="14.318cm">
          <draw:text-box>
            <text:p text:style-name="P3"><text:span text:style-name="T10">•</text:span></text:p>
          </draw:text-box>
        </draw:frame>
        <draw:frame draw:style-name="gr10" draw:text-style-name="P9" draw:layer="layout" svg:width="11.047cm" svg:height="0.636cm" svg:x="18.665cm" svg:y="14.388cm">
          <draw:text-box>
            <text:p text:style-name="P3"><text:span text:style-name="T8">8 features are skewed to the right and </text:span></text:p>
          </draw:text-box>
        </draw:frame>
        <draw:frame draw:style-name="gr10" draw:text-style-name="P9" draw:layer="layout" svg:width="5.565cm" svg:height="0.636cm" svg:x="18.665cm" svg:y="15.158cm">
          <draw:text-box>
            <text:p text:style-name="P3"><text:span text:style-name="T8">4 are normal shape</text:span></text:p>
          </draw:text-box>
        </draw:frame>
        <draw:frame draw:style-name="gr10" draw:text-style-name="P9" draw:layer="layout" svg:width="0.635cm" svg:height="0.712cm" svg:x="17.872cm" svg:y="15.855cm">
          <draw:text-box>
            <text:p text:style-name="P3"><text:span text:style-name="T10">•</text:span></text:p>
          </draw:text-box>
        </draw:frame>
        <draw:frame draw:style-name="gr10" draw:text-style-name="P9" draw:layer="layout" svg:width="10.971cm" svg:height="0.636cm" svg:x="18.665cm" svg:y="15.926cm">
          <draw:text-box>
            <text:p text:style-name="P3"><text:span text:style-name="T8">Outliers need to be treated for logistic </text:span></text:p>
          </draw:text-box>
        </draw:frame>
        <draw:frame draw:style-name="gr10" draw:text-style-name="P9" draw:layer="layout" svg:width="3.088cm" svg:height="0.636cm" svg:x="18.665cm" svg:y="16.667cm">
          <draw:text-box>
            <text:p text:style-name="P3"><text:span text:style-name="T8">regression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line draw:style-name="gr2" draw:text-style-name="P2" draw:layer="layout" svg:x1="2.659cm" svg:y1="17.369cm" svg:x2="31.34cm" svg:y2="17.369cm">
          <text:p/>
        </draw:line>
        <draw:frame draw:style-name="gr9" draw:text-style-name="P2" draw:layer="layout" svg:width="20.24cm" svg:height="10.847cm" svg:x="4.683cm" svg:y="5.741cm">
          <draw:image xlink:href="Pictures/100000000000034700000233AFC53EBB69011143.jpg" xlink:type="simple" xlink:show="embed" xlink:actuate="onLoad" loext:mime-type="image/jpeg">
            <text:p/>
          </draw:image>
        </draw:frame>
        <draw:frame draw:style-name="gr5" draw:text-style-name="P6" draw:layer="layout" svg:width="18.311cm" svg:height="1.568cm" svg:x="2.617cm" svg:y="3.681cm">
          <draw:text-box>
            <text:p text:style-name="P3"><text:span text:style-name="T3">Proposed model solutions</text:span></text:p>
          </draw:text-box>
        </draw:frame>
        <draw:frame draw:style-name="gr10" draw:text-style-name="P9" draw:layer="layout" svg:width="9.87cm" svg:height="0.636cm" svg:x="2.725cm" svg:y="18.08cm">
          <draw:text-box>
            <text:p text:style-name="P3"><text:span text:style-name="T8">*Image taken from Databricks.com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line draw:style-name="gr2" draw:text-style-name="P2" draw:layer="layout" svg:x1="2.659cm" svg:y1="17.369cm" svg:x2="31.34cm" svg:y2="17.369cm">
          <text:p/>
        </draw:line>
        <draw:frame draw:style-name="gr9" draw:text-style-name="P2" draw:layer="layout" svg:width="21.377cm" svg:height="11.403cm" svg:x="5.583cm" svg:y="3.096cm">
          <draw:image xlink:href="Pictures/1000000000000230000001C09E04B9E990D26F19.png" xlink:type="simple" xlink:show="embed" xlink:actuate="onLoad" loext:mime-type="image/png">
            <text:p/>
          </draw:image>
        </draw:frame>
        <draw:frame draw:style-name="gr12" draw:text-style-name="P11" draw:layer="layout" svg:width="28.289cm" svg:height="1.407cm" svg:x="2.724cm" svg:y="1.511cm">
          <draw:text-box>
            <text:p text:style-name="P3"><text:span text:style-name="T13">Comparison of techniques and performances</text:span></text:p>
          </draw:text-box>
        </draw:frame>
        <draw:frame draw:style-name="gr10" draw:text-style-name="P9" draw:layer="layout" svg:width="19.999cm" svg:height="0.636cm" svg:x="5.727cm" svg:y="15.325cm">
          <draw:text-box>
            <text:p text:style-name="P3"><text:span text:style-name="T8">The </text:span><text:span text:style-name="T14">Tuned Random Forest classifier</text:span><text:span text:style-name="T8"> is the best model for this problem</text:span></text:p>
          </draw:text-box>
        </draw:frame>
        <draw:frame draw:style-name="gr10" draw:text-style-name="P9" draw:layer="layout" svg:width="0.635cm" svg:height="0.712cm" svg:x="5.727cm" svg:y="16.023cm">
          <draw:text-box>
            <text:p text:style-name="P3"><text:span text:style-name="T10">•</text:span></text:p>
          </draw:text-box>
        </draw:frame>
        <draw:frame draw:style-name="gr10" draw:text-style-name="P9" draw:layer="layout" svg:width="12.706cm" svg:height="0.636cm" svg:x="6.521cm" svg:y="16.093cm">
          <draw:text-box>
            <text:p text:style-name="P3"><text:span text:style-name="T8">0.83 recall, 0.89 accuracy, and 0.83 precision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line draw:style-name="gr2" draw:text-style-name="P2" draw:layer="layout" svg:x1="2.659cm" svg:y1="17.369cm" svg:x2="31.34cm" svg:y2="17.369cm">
          <text:p/>
        </draw:line>
        <draw:frame draw:style-name="gr9" draw:text-style-name="P2" draw:layer="layout" svg:width="17.647cm" svg:height="11.588cm" svg:x="7.223cm" svg:y="3.545cm">
          <draw:image xlink:href="Pictures/100000000000038D000002AB787E9BF662C679C0.png" xlink:type="simple" xlink:show="embed" xlink:actuate="onLoad" loext:mime-type="image/png">
            <text:p/>
          </draw:image>
        </draw:frame>
        <draw:frame draw:style-name="gr5" draw:text-style-name="P6" draw:layer="layout" svg:width="20.64cm" svg:height="1.568cm" svg:x="2.617cm" svg:y="1.774cm">
          <draw:text-box>
            <text:p text:style-name="P3"><text:span text:style-name="T3">Model features of importance</text:span></text:p>
          </draw:text-box>
        </draw:frame>
        <draw:frame draw:style-name="gr10" draw:text-style-name="P9" draw:layer="layout" svg:width="16.986cm" svg:height="0.636cm" svg:x="4.314cm" svg:y="15.926cm">
          <draw:text-box>
            <text:p text:style-name="P3"><text:span text:style-name="T15">DEBTINC values are high showing a positive contribution to </text:span></text:p>
          </draw:text-box>
        </draw:frame>
        <draw:frame draw:style-name="gr10" draw:text-style-name="P9" draw:layer="layout" svg:width="4.82cm" svg:height="0.636cm" svg:x="4.314cm" svg:y="16.694cm">
          <draw:text-box>
            <text:p text:style-name="P3"><text:span text:style-name="T15">identify defaulter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line draw:style-name="gr2" draw:text-style-name="P2" draw:layer="layout" svg:x1="2.659cm" svg:y1="17.369cm" svg:x2="31.34cm" svg:y2="17.369cm">
          <text:p/>
        </draw:line>
        <draw:frame draw:style-name="gr5" draw:text-style-name="P6" draw:layer="layout" svg:width="27.074cm" svg:height="1.568cm" svg:x="2.617cm" svg:y="2.975cm">
          <draw:text-box>
            <text:p text:style-name="P3"><text:span text:style-name="T3">Proposal for the Final Solution Design </text:span></text:p>
          </draw:text-box>
        </draw:frame>
        <draw:frame draw:style-name="gr6" draw:text-style-name="P7" draw:layer="layout" svg:width="15.187cm" svg:height="0.716cm" svg:x="2.617cm" svg:y="8.088cm">
          <draw:text-box>
            <text:p text:style-name="P3"><text:span text:style-name="T4">The </text:span><text:span text:style-name="T9">Tuned Random Forest classifier</text:span><text:span text:style-name="T4"> is the best </text:span></text:p>
          </draw:text-box>
        </draw:frame>
        <draw:frame draw:style-name="gr6" draw:text-style-name="P7" draw:layer="layout" svg:width="15.991cm" svg:height="0.716cm" svg:x="2.617cm" svg:y="8.936cm">
          <draw:text-box>
            <text:p text:style-name="P3"><text:span text:style-name="T4">model for this problem 0.83 recall, 0.89 accuracy, </text:span></text:p>
          </draw:text-box>
        </draw:frame>
        <draw:frame draw:style-name="gr6" draw:text-style-name="P7" draw:layer="layout" svg:width="5.831cm" svg:height="0.716cm" svg:x="2.617cm" svg:y="9.784cm">
          <draw:text-box>
            <text:p text:style-name="P3"><text:span text:style-name="T4">and 0.83 precision</text:span></text:p>
          </draw:text-box>
        </draw:frame>
        <draw:frame draw:style-name="gr13" draw:text-style-name="P12" draw:layer="layout" svg:width="0.45cm" svg:height="0.501cm" svg:x="2.617cm" svg:y="10.712cm">
          <draw:text-box>
            <text:p text:style-name="P3"><text:span text:style-name="T16">•</text:span></text:p>
          </draw:text-box>
        </draw:frame>
        <draw:frame draw:style-name="gr10" draw:text-style-name="P9" draw:layer="layout" svg:width="15.145cm" svg:height="0.636cm" svg:x="3.252cm" svg:y="10.615cm">
          <draw:text-box>
            <text:p text:style-name="P3"><text:span text:style-name="T8">Recall: Of all the true bad loans, this model identified </text:span></text:p>
          </draw:text-box>
        </draw:frame>
        <draw:frame draw:style-name="gr10" draw:text-style-name="P9" draw:layer="layout" svg:width="3.605cm" svg:height="0.636cm" svg:x="3.252cm" svg:y="11.384cm">
          <draw:text-box>
            <text:p text:style-name="P3"><text:span text:style-name="T8">83% of them.</text:span></text:p>
          </draw:text-box>
        </draw:frame>
        <draw:frame draw:style-name="gr13" draw:text-style-name="P12" draw:layer="layout" svg:width="0.45cm" svg:height="0.501cm" svg:x="2.617cm" svg:y="12.249cm">
          <draw:text-box>
            <text:p text:style-name="P3"><text:span text:style-name="T16">•</text:span></text:p>
          </draw:text-box>
        </draw:frame>
        <draw:frame draw:style-name="gr10" draw:text-style-name="P9" draw:layer="layout" svg:width="14.721cm" svg:height="0.636cm" svg:x="3.252cm" svg:y="12.152cm">
          <draw:text-box>
            <text:p text:style-name="P3"><text:span text:style-name="T8">Precision: When loans are predicted to be bad, they </text:span></text:p>
          </draw:text-box>
        </draw:frame>
        <draw:frame draw:style-name="gr9" draw:text-style-name="P2" draw:layer="layout" svg:width="25.002cm" svg:height="1.269cm" svg:x="2.831cm" svg:y="6.059cm">
          <draw:image xlink:href="Pictures/10000000000002280000001FA02B230C3E1787CC.png" xlink:type="simple" xlink:show="embed" xlink:actuate="onLoad" loext:mime-type="image/png">
            <text:p/>
          </draw:image>
        </draw:frame>
        <draw:frame draw:style-name="gr9" draw:text-style-name="P2" draw:layer="layout" svg:width="9.603cm" svg:height="7.672cm" svg:x="18.23cm" svg:y="7.858cm">
          <draw:image xlink:href="Pictures/1000000000000300000001B80C108291D1BB6014.jpg" xlink:type="simple" xlink:show="embed" xlink:actuate="onLoad" loext:mime-type="image/jpeg">
            <text:p/>
          </draw:image>
        </draw:frame>
        <draw:frame draw:style-name="gr9" draw:text-style-name="P2" draw:layer="layout" svg:width="9.947cm" svg:height="1.322cm" svg:x="17.886cm" svg:y="4.763cm">
          <draw:image xlink:href="Pictures/10000000000000E000000019093A550A9633CDF0.png" xlink:type="simple" xlink:show="embed" xlink:actuate="onLoad" loext:mime-type="image/png">
            <text:p/>
          </draw:image>
        </draw:frame>
        <draw:frame draw:style-name="gr10" draw:text-style-name="P9" draw:layer="layout" svg:width="6.797cm" svg:height="0.636cm" svg:x="3.252cm" svg:y="12.92cm">
          <draw:text-box>
            <text:p text:style-name="P3"><text:span text:style-name="T8">are bad 83% of the time.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line draw:style-name="gr2" draw:text-style-name="P2" draw:layer="layout" svg:x1="2.659cm" svg:y1="17.369cm" svg:x2="31.34cm" svg:y2="17.369cm">
          <text:p/>
        </draw:line>
        <draw:frame draw:style-name="gr5" draw:text-style-name="P6" draw:layer="layout" svg:width="13.811cm" svg:height="1.568cm" svg:x="2.617cm" svg:y="3.681cm">
          <draw:text-box>
            <text:p text:style-name="P3"><text:span text:style-name="T3">Executive summary</text:span></text:p>
          </draw:text-box>
        </draw:frame>
        <draw:frame draw:style-name="gr7" draw:text-style-name="P8" draw:layer="layout" svg:width="0.503cm" svg:height="0.564cm" svg:x="2.617cm" svg:y="6.186cm">
          <draw:text-box>
            <text:p text:style-name="P3"><text:span text:style-name="T5">•</text:span></text:p>
          </draw:text-box>
        </draw:frame>
        <draw:frame draw:style-name="gr8" draw:text-style-name="P7" draw:layer="layout" svg:width="29.606cm" svg:height="0.716cm" svg:x="3.252cm" svg:y="6.073cm">
          <draw:text-box>
            <text:p text:style-name="P3"><text:span text:style-name="T4">The Tuned Random Forest Classifier can predict loan defaulters 83% of the time they ask for </text:span></text:p>
          </draw:text-box>
        </draw:frame>
        <draw:frame draw:style-name="gr6" draw:text-style-name="P7" draw:layer="layout" svg:width="4.087cm" svg:height="0.716cm" svg:x="3.252cm" svg:y="7.081cm">
          <draw:text-box>
            <text:p text:style-name="P3"><text:span text:style-name="T4">a home loan.</text:span></text:p>
          </draw:text-box>
        </draw:frame>
        <draw:frame draw:style-name="gr7" draw:text-style-name="P8" draw:layer="layout" svg:width="0.503cm" svg:height="0.564cm" svg:x="2.617cm" svg:y="8.571cm">
          <draw:text-box>
            <text:p text:style-name="P3"><text:span text:style-name="T5">•</text:span></text:p>
          </draw:text-box>
        </draw:frame>
        <draw:frame draw:style-name="gr6" draw:text-style-name="P7" draw:layer="layout" svg:width="29.263cm" svg:height="0.716cm" svg:x="3.252cm" svg:y="8.459cm">
          <draw:text-box>
            <text:p text:style-name="P3"><text:span text:style-name="T4">This model has the highest recall, 83% for class 1 on the test data, 83% precision score, and </text:span></text:p>
          </draw:text-box>
        </draw:frame>
        <draw:frame draw:style-name="gr6" draw:text-style-name="P7" draw:layer="layout" svg:width="4.494cm" svg:height="0.716cm" svg:x="3.252cm" svg:y="9.466cm">
          <draw:text-box>
            <text:p text:style-name="P3"><text:span text:style-name="T4">89% accuracy.</text:span></text:p>
          </draw:text-box>
        </draw:frame>
        <draw:frame draw:style-name="gr7" draw:text-style-name="P8" draw:layer="layout" svg:width="0.503cm" svg:height="0.564cm" svg:x="2.617cm" svg:y="10.956cm">
          <draw:text-box>
            <text:p text:style-name="P3"><text:span text:style-name="T5">•</text:span></text:p>
          </draw:text-box>
        </draw:frame>
        <draw:frame draw:style-name="gr6" draw:text-style-name="P7" draw:layer="layout" svg:width="26.676cm" svg:height="0.716cm" svg:x="3.252cm" svg:y="10.843cm">
          <draw:text-box>
            <text:p text:style-name="P3"><text:span text:style-name="T4">The most important features to make a proper prediction are DEBINC, DELINQ, and </text:span></text:p>
          </draw:text-box>
        </draw:frame>
        <draw:frame draw:style-name="gr8" draw:text-style-name="P7" draw:layer="layout" svg:width="2.208cm" svg:height="0.716cm" svg:x="3.252cm" svg:y="11.849cm">
          <draw:text-box>
            <text:p text:style-name="P3"><text:span text:style-name="T4">CLAGE</text:span></text:p>
          </draw:text-box>
        </draw:frame>
        <draw:frame draw:style-name="gr14" draw:text-style-name="P8" draw:layer="layout" svg:width="0.502cm" svg:height="0.564cm" svg:x="2.617cm" svg:y="13.341cm">
          <draw:text-box>
            <text:p text:style-name="P3"><text:span text:style-name="T5">•</text:span></text:p>
          </draw:text-box>
        </draw:frame>
        <draw:frame draw:style-name="gr6" draw:text-style-name="P7" draw:layer="layout" svg:width="28.683cm" svg:height="0.716cm" svg:x="3.252cm" svg:y="13.229cm">
          <draw:text-box>
            <text:p text:style-name="P3"><text:span text:style-name="T4">Debt-to-Income ratio is the most important feature but has the most missing data (21.3%) </text:span></text:p>
          </draw:text-box>
        </draw:frame>
        <draw:frame draw:style-name="gr6" draw:text-style-name="P7" draw:layer="layout" svg:width="20.339cm" svg:height="0.716cm" svg:x="3.252cm" svg:y="14.261cm">
          <draw:text-box>
            <text:p text:style-name="P3"><text:span text:style-name="T4">which is similar to the proportion of defaulted customers(19.9%)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line draw:style-name="gr2" draw:text-style-name="P2" draw:layer="layout" svg:x1="2.659cm" svg:y1="17.369cm" svg:x2="31.34cm" svg:y2="17.369cm">
          <text:p/>
        </draw:line>
        <draw:frame draw:style-name="gr5" draw:text-style-name="P6" draw:layer="layout" svg:width="23.692cm" svg:height="1.568cm" svg:x="2.617cm" svg:y="3.681cm">
          <draw:text-box>
            <text:p text:style-name="P3"><text:span text:style-name="T3">Recommendations and next steps</text:span></text:p>
          </draw:text-box>
        </draw:frame>
        <draw:frame draw:style-name="gr7" draw:text-style-name="P8" draw:layer="layout" svg:width="0.503cm" svg:height="0.564cm" svg:x="2.617cm" svg:y="6.186cm">
          <draw:text-box>
            <text:p text:style-name="P3"><text:span text:style-name="T5">•</text:span></text:p>
          </draw:text-box>
        </draw:frame>
        <draw:frame draw:style-name="gr8" draw:text-style-name="P7" draw:layer="layout" svg:width="21.097cm" svg:height="0.716cm" svg:x="3.252cm" svg:y="6.073cm">
          <draw:text-box>
            <text:p text:style-name="P3"><text:span text:style-name="T4">Check if there is a way to complete the missing values in the data.</text:span></text:p>
          </draw:text-box>
        </draw:frame>
        <draw:frame draw:style-name="gr14" draw:text-style-name="P8" draw:layer="layout" svg:width="0.502cm" svg:height="0.564cm" svg:x="2.617cm" svg:y="7.565cm">
          <draw:text-box>
            <text:p text:style-name="P3"><text:span text:style-name="T5">•</text:span></text:p>
          </draw:text-box>
        </draw:frame>
        <draw:frame draw:style-name="gr6" draw:text-style-name="P7" draw:layer="layout" svg:width="29.927cm" svg:height="0.716cm" svg:x="3.252cm" svg:y="7.452cm">
          <draw:text-box>
            <text:p text:style-name="P3"><text:span text:style-name="T4">Check the possibility to create an alternative business process to manage and take decisions </text:span></text:p>
          </draw:text-box>
        </draw:frame>
        <draw:frame draw:style-name="gr6" draw:text-style-name="P7" draw:layer="layout" svg:width="17.824cm" svg:height="0.716cm" svg:x="3.252cm" svg:y="8.459cm">
          <draw:text-box>
            <text:p text:style-name="P3"><text:span text:style-name="T4">on those clients with no Debt-to-Income ratio available.</text:span></text:p>
          </draw:text-box>
        </draw:frame>
        <draw:frame draw:style-name="gr7" draw:text-style-name="P8" draw:layer="layout" svg:width="0.503cm" svg:height="0.564cm" svg:x="2.617cm" svg:y="9.948cm">
          <draw:text-box>
            <text:p text:style-name="P3"><text:span text:style-name="T5">•</text:span></text:p>
          </draw:text-box>
        </draw:frame>
        <draw:frame draw:style-name="gr6" draw:text-style-name="P7" draw:layer="layout" svg:width="28.293cm" svg:height="0.716cm" svg:x="3.252cm" svg:y="9.836cm">
          <draw:text-box>
            <text:p text:style-name="P3"><text:span text:style-name="T4">Create a pilot test with the new model and compare the results with the current manual </text:span></text:p>
          </draw:text-box>
        </draw:frame>
        <draw:frame draw:style-name="gr6" draw:text-style-name="P7" draw:layer="layout" svg:width="18.912cm" svg:height="0.716cm" svg:x="3.252cm" svg:y="10.843cm">
          <draw:text-box>
            <text:p text:style-name="P3"><text:span text:style-name="T4">process before completing the transition to the new model.</text:span></text:p>
          </draw:text-box>
        </draw:frame>
        <draw:frame draw:style-name="gr7" draw:text-style-name="P8" draw:layer="layout" svg:width="0.503cm" svg:height="0.564cm" svg:x="2.617cm" svg:y="12.333cm">
          <draw:text-box>
            <text:p text:style-name="P3"><text:span text:style-name="T5">•</text:span></text:p>
          </draw:text-box>
        </draw:frame>
        <draw:frame draw:style-name="gr6" draw:text-style-name="P7" draw:layer="layout" svg:width="29.364cm" svg:height="0.716cm" svg:x="3.252cm" svg:y="12.221cm">
          <draw:text-box>
            <text:p text:style-name="P3"><text:span text:style-name="T4">Explore other machine learning techniques such as feature engineering, dropping columns, </text:span></text:p>
          </draw:text-box>
        </draw:frame>
        <draw:frame draw:style-name="gr6" draw:text-style-name="P7" draw:layer="layout" svg:width="14.933cm" svg:height="0.716cm" svg:x="3.252cm" svg:y="13.229cm">
          <draw:text-box>
            <text:p text:style-name="P3"><text:span text:style-name="T4">support vector machine, and neural networks. 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line draw:style-name="gr2" draw:text-style-name="P2" draw:layer="layout" svg:x1="2.659cm" svg:y1="17.369cm" svg:x2="31.34cm" svg:y2="17.369cm">
          <text:p/>
        </draw:line>
        <draw:frame draw:style-name="gr15" draw:text-style-name="P13" draw:layer="layout" svg:width="15.013cm" svg:height="1.563cm" svg:x="2.723cm" svg:y="1.987cm">
          <draw:text-box>
            <text:p text:style-name="P3"><text:span text:style-name="T17">Risks and Challenges</text:span></text:p>
          </draw:text-box>
        </draw:frame>
        <draw:frame draw:style-name="gr11" draw:text-style-name="P10" draw:layer="layout" svg:width="6.445cm" svg:height="0.611cm" svg:x="2.723cm" svg:y="3.968cm">
          <draw:text-box>
            <text:p text:style-name="P3"><text:span text:style-name="T18">Trust and Transparency</text:span></text:p>
          </draw:text-box>
        </draw:frame>
        <draw:frame draw:style-name="gr16" draw:text-style-name="P14" draw:layer="layout" svg:width="0.422cm" svg:height="0.475cm" svg:x="2.723cm" svg:y="5.155cm">
          <draw:text-box>
            <text:p text:style-name="P3"><text:span text:style-name="T19">•</text:span></text:p>
          </draw:text-box>
        </draw:frame>
        <draw:frame draw:style-name="gr11" draw:text-style-name="P10" draw:layer="layout" svg:width="12.795cm" svg:height="0.611cm" svg:x="3.358cm" svg:y="5.055cm">
          <draw:text-box>
            <text:p text:style-name="P3"><text:span text:style-name="T20">Risk- Lack of transparency in decision making.</text:span></text:p>
          </draw:text-box>
        </draw:frame>
        <draw:frame draw:style-name="gr17" draw:text-style-name="P14" draw:layer="layout" svg:width="0.423cm" svg:height="0.475cm" svg:x="2.723cm" svg:y="6.214cm">
          <draw:text-box>
            <text:p text:style-name="P3"><text:span text:style-name="T19">•</text:span></text:p>
          </draw:text-box>
        </draw:frame>
        <draw:frame draw:style-name="gr11" draw:text-style-name="P10" draw:layer="layout" svg:width="21.668cm" svg:height="0.611cm" svg:x="3.358cm" svg:y="6.114cm">
          <draw:text-box>
            <text:p text:style-name="P3"><text:span text:style-name="T20">Challenge- Clear communication, transparency in explaining model functioning.</text:span></text:p>
          </draw:text-box>
        </draw:frame>
        <draw:frame draw:style-name="gr11" draw:text-style-name="P10" draw:layer="layout" svg:width="3.266cm" svg:height="0.611cm" svg:x="2.723cm" svg:y="7.201cm">
          <draw:text-box>
            <text:p text:style-name="P3"><text:span text:style-name="T18">Bias in Data</text:span></text:p>
          </draw:text-box>
        </draw:frame>
        <draw:frame draw:style-name="gr16" draw:text-style-name="P14" draw:layer="layout" svg:width="0.422cm" svg:height="0.475cm" svg:x="2.723cm" svg:y="8.361cm">
          <draw:text-box>
            <text:p text:style-name="P3"><text:span text:style-name="T19">•</text:span></text:p>
          </draw:text-box>
        </draw:frame>
        <draw:frame draw:style-name="gr11" draw:text-style-name="P10" draw:layer="layout" svg:width="10.742cm" svg:height="0.611cm" svg:x="3.358cm" svg:y="8.26cm">
          <draw:text-box>
            <text:p text:style-name="P3"><text:span text:style-name="T20">Risk- Inherent biases in historical data.</text:span></text:p>
          </draw:text-box>
        </draw:frame>
        <draw:frame draw:style-name="gr17" draw:text-style-name="P14" draw:layer="layout" svg:width="0.423cm" svg:height="0.475cm" svg:x="2.723cm" svg:y="9.446cm">
          <draw:text-box>
            <text:p text:style-name="P3"><text:span text:style-name="T19">•</text:span></text:p>
          </draw:text-box>
        </draw:frame>
        <draw:frame draw:style-name="gr11" draw:text-style-name="P10" draw:layer="layout" svg:width="19.89cm" svg:height="0.611cm" svg:x="3.358cm" svg:y="9.346cm">
          <draw:text-box>
            <text:p text:style-name="P3"><text:span text:style-name="T20">Challenge- Regular monitoring and audits to identify and address biases.</text:span></text:p>
          </draw:text-box>
        </draw:frame>
        <draw:frame draw:style-name="gr11" draw:text-style-name="P10" draw:layer="layout" svg:width="4.654cm" svg:height="0.611cm" svg:x="2.723cm" svg:y="10.406cm">
          <draw:text-box>
            <text:p text:style-name="P3"><text:span text:style-name="T18">Model Overfitting</text:span></text:p>
          </draw:text-box>
        </draw:frame>
        <draw:frame draw:style-name="gr16" draw:text-style-name="P14" draw:layer="layout" svg:width="0.422cm" svg:height="0.475cm" svg:x="2.723cm" svg:y="11.594cm">
          <draw:text-box>
            <text:p text:style-name="P3"><text:span text:style-name="T19">•</text:span></text:p>
          </draw:text-box>
        </draw:frame>
        <draw:frame draw:style-name="gr11" draw:text-style-name="P10" draw:layer="layout" svg:width="8.939cm" svg:height="0.611cm" svg:x="3.358cm" svg:y="11.493cm">
          <draw:text-box>
            <text:p text:style-name="P3"><text:span text:style-name="T20">Risk- Overfitting to training data.</text:span></text:p>
          </draw:text-box>
        </draw:frame>
        <draw:frame draw:style-name="gr17" draw:text-style-name="P14" draw:layer="layout" svg:width="0.423cm" svg:height="0.475cm" svg:x="2.723cm" svg:y="12.652cm">
          <draw:text-box>
            <text:p text:style-name="P3"><text:span text:style-name="T19">•</text:span></text:p>
          </draw:text-box>
        </draw:frame>
        <draw:frame draw:style-name="gr11" draw:text-style-name="P10" draw:layer="layout" svg:width="24.505cm" svg:height="0.611cm" svg:x="3.358cm" svg:y="12.552cm">
          <draw:text-box>
            <text:p text:style-name="P3"><text:span text:style-name="T20">Challenge- Regular evaluation on diverse datasets, cross validation to prevent overfitting.</text:span></text:p>
          </draw:text-box>
        </draw:frame>
        <draw:frame draw:style-name="gr11" draw:text-style-name="P10" draw:layer="layout" svg:width="6.962cm" svg:height="0.611cm" svg:x="2.723cm" svg:y="13.639cm">
          <draw:text-box>
            <text:p text:style-name="P3"><text:span text:style-name="T18">Data Privacy and security</text:span></text:p>
          </draw:text-box>
        </draw:frame>
        <draw:frame draw:style-name="gr17" draw:text-style-name="P14" draw:layer="layout" svg:width="0.423cm" svg:height="0.475cm" svg:x="2.723cm" svg:y="14.799cm">
          <draw:text-box>
            <text:p text:style-name="P3"><text:span text:style-name="T19">•</text:span></text:p>
          </draw:text-box>
        </draw:frame>
        <draw:frame draw:style-name="gr11" draw:text-style-name="P10" draw:layer="layout" svg:width="18.044cm" svg:height="0.611cm" svg:x="3.358cm" svg:y="14.699cm">
          <draw:text-box>
            <text:p text:style-name="P3"><text:span text:style-name="T20">Risk- Privacy and security concerns with sensitive customer data.</text:span></text:p>
          </draw:text-box>
        </draw:frame>
        <draw:frame draw:style-name="gr16" draw:text-style-name="P14" draw:layer="layout" svg:width="0.422cm" svg:height="0.475cm" svg:x="2.723cm" svg:y="15.886cm">
          <draw:text-box>
            <text:p text:style-name="P3"><text:span text:style-name="T19">•</text:span></text:p>
          </draw:text-box>
        </draw:frame>
        <draw:frame draw:style-name="gr11" draw:text-style-name="P10" draw:layer="layout" svg:width="24.043cm" svg:height="0.611cm" svg:x="3.358cm" svg:y="15.786cm">
          <draw:text-box>
            <text:p text:style-name="P3"><text:span text:style-name="T20">Challenge- Compliance with data protection regulations, robust data security measures.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line draw:style-name="gr2" draw:text-style-name="P2" draw:layer="layout" svg:x1="2.659cm" svg:y1="17.369cm" svg:x2="31.34cm" svg:y2="17.369cm">
          <text:p/>
        </draw:line>
        <draw:frame draw:style-name="gr5" draw:text-style-name="P6" draw:layer="layout" svg:width="27.117cm" svg:height="1.568cm" svg:x="2.617cm" svg:y="3.681cm">
          <draw:text-box>
            <text:p text:style-name="P3"><text:span text:style-name="T3">Why is recall important to this project?</text:span></text:p>
          </draw:text-box>
        </draw:frame>
        <draw:frame draw:style-name="gr11" draw:text-style-name="P10" draw:layer="layout" svg:width="14.328cm" svg:height="0.611cm" svg:x="2.617cm" svg:y="5.946cm">
          <draw:text-box>
            <text:p text:style-name="P3"><text:span text:style-name="T21">The model can make two types of wrong predictions:</text:span></text:p>
          </draw:text-box>
        </draw:frame>
        <draw:frame draw:style-name="gr11" draw:text-style-name="P10" draw:layer="layout" svg:width="18.231cm" svg:height="0.611cm" svg:x="2.617cm" svg:y="7.033cm">
          <draw:text-box>
            <text:p text:style-name="P3"><text:span text:style-name="T12">1. Predicting a client will pay their loan when the client cannot pay. </text:span></text:p>
          </draw:text-box>
        </draw:frame>
        <draw:frame draw:style-name="gr11" draw:text-style-name="P10" draw:layer="layout" svg:width="18.341cm" svg:height="0.611cm" svg:x="2.617cm" svg:y="8.092cm">
          <draw:text-box>
            <text:p text:style-name="P3"><text:span text:style-name="T12">2. Predicting a client will not pay their loan when the client can pay.</text:span></text:p>
          </draw:text-box>
        </draw:frame>
        <draw:frame draw:style-name="gr11" draw:text-style-name="P10" draw:layer="layout" svg:width="6.97cm" svg:height="0.611cm" svg:x="2.617cm" svg:y="9.179cm">
          <draw:text-box>
            <text:p text:style-name="P3"><text:span text:style-name="T21">Which is more important?</text:span></text:p>
          </draw:text-box>
        </draw:frame>
        <draw:frame draw:style-name="gr17" draw:text-style-name="P14" draw:layer="layout" svg:width="0.423cm" svg:height="0.475cm" svg:x="2.617cm" svg:y="10.339cm">
          <draw:text-box>
            <text:p text:style-name="P3"><text:span text:style-name="T22">•</text:span></text:p>
          </draw:text-box>
        </draw:frame>
        <draw:frame draw:style-name="gr11" draw:text-style-name="P10" draw:layer="layout" svg:width="29.339cm" svg:height="0.611cm" svg:x="3.57cm" svg:y="10.239cm">
          <draw:text-box>
            <text:p text:style-name="P3"><text:span text:style-name="T21">Predicting the client will pay but the client cannot.</text:span><text:span text:style-name="T12"> I.e., losing money immediately. This would be considered </text:span></text:p>
          </draw:text-box>
        </draw:frame>
        <draw:frame draw:style-name="gr11" draw:text-style-name="P10" draw:layer="layout" svg:width="29.466cm" svg:height="0.611cm" svg:x="3.57cm" svg:y="10.954cm">
          <draw:text-box>
            <text:p text:style-name="P3"><text:span text:style-name="T12">the most important case of wrong predictions because it would have a negative effect on the banks "bottom </text:span></text:p>
          </draw:text-box>
        </draw:frame>
        <draw:frame draw:style-name="gr11" draw:text-style-name="P10" draw:layer="layout" svg:width="11.826cm" svg:height="0.611cm" svg:x="3.57cm" svg:y="11.696cm">
          <draw:text-box>
            <text:p text:style-name="P3"><text:span text:style-name="T12">line" and the bank would not make a profit. </text:span></text:p>
          </draw:text-box>
        </draw:frame>
        <draw:frame draw:style-name="gr11" draw:text-style-name="P10" draw:layer="layout" svg:width="6.703cm" svg:height="0.611cm" svg:x="2.617cm" svg:y="12.756cm">
          <draw:text-box>
            <text:p text:style-name="P3"><text:span text:style-name="T21">How to reduce this loss?</text:span></text:p>
          </draw:text-box>
        </draw:frame>
        <draw:frame draw:style-name="gr17" draw:text-style-name="P14" draw:layer="layout" svg:width="0.423cm" svg:height="0.475cm" svg:x="2.617cm" svg:y="13.942cm">
          <draw:text-box>
            <text:p text:style-name="P3"><text:span text:style-name="T22">•</text:span></text:p>
          </draw:text-box>
        </draw:frame>
        <draw:frame draw:style-name="gr11" draw:text-style-name="P10" draw:layer="layout" svg:width="27.4cm" svg:height="0.611cm" svg:x="3.57cm" svg:y="13.842cm">
          <draw:text-box>
            <text:p text:style-name="P3"><text:span text:style-name="T12">The bank would want the RECALL to be maximized. The greater the recall, the higher the chances of </text:span></text:p>
          </draw:text-box>
        </draw:frame>
        <draw:frame draw:style-name="gr11" draw:text-style-name="P10" draw:layer="layout" svg:width="29.525cm" svg:height="0.611cm" svg:x="3.57cm" svg:y="14.558cm">
          <draw:text-box>
            <text:p text:style-name="P3"><text:span text:style-name="T12">minimizing the false negatives or identifying the true positives. This would help increase the bank profit that </text:span></text:p>
          </draw:text-box>
        </draw:frame>
        <draw:frame draw:style-name="gr11" draw:text-style-name="P10" draw:layer="layout" svg:width="13.354cm" svg:height="0.611cm" svg:x="3.57cm" svg:y="15.273cm">
          <draw:text-box>
            <text:p text:style-name="P3"><text:span text:style-name="T12">comes from interests in the form of home loans. 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line draw:style-name="gr2" draw:text-style-name="P2" draw:layer="layout" svg:x1="2.659cm" svg:y1="17.369cm" svg:x2="31.34cm" svg:y2="17.369cm">
          <text:p/>
        </draw:line>
        <draw:frame draw:style-name="gr9" draw:text-style-name="P2" draw:layer="layout" svg:width="15.265cm" svg:height="11.138cm" svg:x="2.143cm" svg:y="5.45cm">
          <draw:image xlink:href="Pictures/100000000000039A000003753F52C6671A102B41.jpg" xlink:type="simple" xlink:show="embed" xlink:actuate="onLoad" loext:mime-type="image/jpeg">
            <text:p/>
          </draw:image>
        </draw:frame>
        <draw:frame draw:style-name="gr5" draw:text-style-name="P6" draw:layer="layout" svg:width="7.529cm" svg:height="1.568cm" svg:x="2.617cm" svg:y="3.681cm">
          <draw:text-box>
            <text:p text:style-name="P3"><text:span text:style-name="T3">Thank You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Georgia Pro Light1" svg:font-family="'Georgia Pro Light'"/>
    <style:font-face style:name="Arial1" svg:font-family="Arial" style:font-pitch="variable"/>
    <style:font-face style:name="Georgia Pro Light" svg:font-family="'Georgia Pro Light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4"/>
    <meta:generator>Trio_Office/6.2.8.2$Windows_x86 LibreOffice_project/</meta:generator>
  </office:meta>
</office:document-meta>
</file>